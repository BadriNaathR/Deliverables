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space Neon" svg:font-family="'Monaspace Neon', ui-monospace, SFMono-Regular, 'SF Mono', Menlo, Consolas, 'Liberation Mono', monospace"/>
    <style:font-face style:name="OpenSymbol" svg:font-family="OpenSymbol"/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/>
    </style:style>
    <style:style style:name="P3" style:family="paragraph" style:parent-style-name="Text_20_body" style:list-style-name="L2">
      <style:paragraph-properties fo:margin-left="0in" fo:margin-right="0in" fo:margin-top="0in" fo:margin-bottom="0in" fo:orphans="2" fo:widows="2" fo:text-indent="0in" style:auto-text-indent="false"/>
    </style:style>
    <style:style style:name="P4" style:family="paragraph" style:parent-style-name="Text_20_body" style:list-style-name="L3">
      <style:paragraph-properties fo:margin-left="0in" fo:margin-right="0in" fo:margin-top="0in" fo:margin-bottom="0in" fo:orphans="2" fo:widows="2" fo:text-indent="0in" style:auto-text-indent="false"/>
    </style:style>
    <style:style style:name="P5" style:family="paragraph" style:parent-style-name="Text_20_body" style:list-style-name="L5">
      <style:paragraph-properties fo:margin-left="0in" fo:margin-right="0in" fo:margin-top="0in" fo:margin-bottom="0in" fo:orphans="2" fo:widows="2" fo:text-indent="0in" style:auto-text-indent="false"/>
    </style:style>
    <style:style style:name="P6" style:family="paragraph" style:parent-style-name="Text_20_body" style:list-style-name="L6">
      <style:paragraph-properties fo:margin-left="0in" fo:margin-right="0in" fo:margin-top="0in" fo:margin-bottom="0in" fo:orphans="2" fo:widows="2" fo:text-indent="0in" style:auto-text-indent="false"/>
    </style:style>
    <style:style style:name="P7" style:family="paragraph" style:parent-style-name="Text_20_body" style:list-style-name="L3">
      <style:paragraph-properties fo:margin-top="0in" fo:margin-bottom="0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11" style:family="paragraph" style:parent-style-name="Text_20_body" style:list-style-name="L6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12" style:family="paragraph" style:parent-style-name="Text_20_body" style:list-style-name="L7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top="0in" fo:margin-bottom="0.1665in" fo:orphans="2" fo:widows="2"/>
    </style:style>
    <style:style style:name="P14" style:family="paragraph" style:parent-style-name="Heading_20_1">
      <style:text-properties fo:font-variant="normal" fo:text-transform="none" fo:color="#1f2328" style:font-name="apple-system" fo:font-size="12pt" fo:letter-spacing="normal" fo:font-style="normal" fo:font-weight="bold"/>
    </style:style>
    <style:style style:name="P15" style:family="paragraph" style:parent-style-name="Preformatted_20_Text" style:list-style-name="L4">
      <style:paragraph-properties fo:margin-left="0in" fo:margin-right="0in" fo:margin-top="0in" fo:margin-bottom="0in" fo:line-height="145%" fo:orphans="2" fo:widows="2" fo:text-indent="0in" style:auto-text-indent="false" fo:background-color="#f6f8fa" fo:padding="0in" fo:border="none">
        <style:background-image/>
      </style:paragraph-properties>
    </style:style>
    <style:style style:name="P16" style:family="paragraph" style:parent-style-name="Preformatted_20_Text" style:list-style-name="L4">
      <style:paragraph-properties fo:margin-top="0in" fo:margin-bottom="0in" fo:line-height="145%" fo:orphans="2" fo:widows="2" fo:background-color="#f6f8fa" fo:padding="0in" fo:border="none">
        <style:background-image/>
      </style:paragraph-properties>
    </style:style>
    <style:style style:name="P17" style:family="paragraph" style:parent-style-name="Heading_20_2">
      <style:paragraph-properties fo:margin-left="0in" fo:margin-right="0in" fo:margin-top="0.25in" fo:margin-bottom="0.1665in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008in solid #000000"/>
      <style:text-properties fo:font-variant="normal" fo:text-transform="none" fo:color="#1f2328" style:font-name="apple-system" fo:font-size="12pt" fo:letter-spacing="normal" fo:font-style="normal" fo:font-weight="bold"/>
    </style:style>
    <style:style style:name="T1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1f2328" style:font-name="Monaspace Neon" fo:font-size="9.75pt" fo:letter-spacing="normal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functional-test-case-voice-recognition-system-mp3mp4-input-with-score-card" text:anchor-type="page" text:anchor-page-number="1" svg:x="-0.2917in" svg:y="0.8854in" svg:width="0.2917in" draw:z-index="0">
        <draw:text-box fo:min-height="0.2917in">
          <text:p text:style-name="Text_20_body"/>
        </draw:text-box>
      </draw:frame>
      <draw:frame draw:style-name="fr1" draw:name="user-content-test-case-id" text:anchor-type="page" text:anchor-page-number="1" svg:x="-0.2917in" svg:y="0.1874in" svg:width="0.2917in" draw:z-index="1">
        <draw:text-box fo:min-height="0.2917in">
          <text:p text:style-name="Text_20_body"/>
        </draw:text-box>
      </draw:frame>
      <draw:frame draw:style-name="fr1" draw:name="user-content-title" text:anchor-type="page" text:anchor-page-number="1" svg:x="-0.2917in" svg:y="0.1874in" svg:width="0.2917in" draw:z-index="2">
        <draw:text-box fo:min-height="0.2917in">
          <text:p text:style-name="Text_20_body"/>
        </draw:text-box>
      </draw:frame>
      <draw:frame draw:style-name="fr1" draw:name="user-content-pre-requisites" text:anchor-type="page" text:anchor-page-number="1" svg:x="-0.2917in" svg:y="0.1874in" svg:width="0.2917in" draw:z-index="3">
        <draw:text-box fo:min-height="0.2917in">
          <text:p text:style-name="Text_20_body"/>
        </draw:text-box>
      </draw:frame>
      <draw:frame draw:style-name="fr1" draw:name="user-content-test-data" text:anchor-type="page" text:anchor-page-number="1" svg:x="-0.2917in" svg:y="0.1874in" svg:width="0.2917in" draw:z-index="4">
        <draw:text-box fo:min-height="0.2917in">
          <text:p text:style-name="Text_20_body"/>
        </draw:text-box>
      </draw:frame>
      <draw:frame draw:style-name="fr1" draw:name="user-content-steps" text:anchor-type="page" text:anchor-page-number="1" svg:x="-0.2917in" svg:y="0.1874in" svg:width="0.2917in" draw:z-index="5">
        <draw:text-box fo:min-height="0.2917in">
          <text:p text:style-name="Text_20_body"/>
        </draw:text-box>
      </draw:frame>
      <draw:frame draw:style-name="fr1" draw:name="user-content-expected-results" text:anchor-type="page" text:anchor-page-number="1" svg:x="-0.2917in" svg:y="0.1874in" svg:width="0.2917in" draw:z-index="6">
        <draw:text-box fo:min-height="0.2917in">
          <text:p text:style-name="Text_20_body"/>
        </draw:text-box>
      </draw:frame>
      <draw:frame draw:style-name="fr1" draw:name="user-content-negative-test-cases" text:anchor-type="page" text:anchor-page-number="1" svg:x="-0.2917in" svg:y="0.1874in" svg:width="0.2917in" draw:z-index="7">
        <draw:text-box fo:min-height="0.2917in">
          <text:p text:style-name="Text_20_body"/>
        </draw:text-box>
      </draw:frame>
      <draw:frame draw:style-name="fr1" draw:name="user-content-post-conditions" text:anchor-type="page" text:anchor-page-number="1" svg:x="-0.2917in" svg:y="0.1874in" svg:width="0.2917in" draw:z-index="8">
        <draw:text-box fo:min-height="0.2917in">
          <text:p text:style-name="Text_20_body"/>
        </draw:text-box>
      </draw:frame>
      <draw:frame draw:style-name="fr1" draw:name="user-content-comments" text:anchor-type="page" text:anchor-page-number="1" svg:x="-0.2917in" svg:y="0.1874in" svg:width="0.2917in" draw:z-index="9">
        <draw:text-box fo:min-height="0.2917in">
          <text:p text:style-name="Text_20_body"/>
        </draw:text-box>
      </draw:frame>
      <text:h text:style-name="P14" text:outline-level="1">Functional Test Case: Voice Recognition System (MP3/MP4 Input with Score Card)</text:h>
      <text:p text:style-name="Horizontal_20_Line"/>
      <text:h text:style-name="P17" text:outline-level="2">Test Case ID</text:h>
      <text:p text:style-name="P1">TC_VR_001</text:p>
      <text:h text:style-name="P17" text:outline-level="2">Title</text:h>
      <text:p text:style-name="P1">Verify voice recognition accuracy and score card generation from MP3/MP4 audio input</text:p>
      <text:p text:style-name="Horizontal_20_Line"/>
      <text:h text:style-name="P17" text:outline-level="2">Pre-requisites</text:h>
      <text:list xml:id="list2317380193422730659" text:style-name="L1">
        <text:list-item>
          <text:p text:style-name="P8">Voice Recognition system setup as per [USER_MANUAL_Voice_Recognition.md]</text:p>
        </text:list-item>
        <text:list-item>
          <text:p text:style-name="P2"><text:span text:style-name="T1">Python 3.8+ and required packages (</text:span><text:span text:style-name="Source_20_Text"><text:span text:style-name="T3">SpeechRecognition</text:span></text:span><text:span text:style-name="T1">, </text:span><text:span text:style-name="Source_20_Text"><text:span text:style-name="T3">pydub</text:span></text:span><text:span text:style-name="T1">, </text:span><text:span text:style-name="Source_20_Text"><text:span text:style-name="T3">moviepy</text:span></text:span><text:span text:style-name="T1">) installed</text:span></text:p>
        </text:list-item>
        <text:list-item>
          <text:p text:style-name="P8">FFmpeg installed and available in PATH</text:p>
        </text:list-item>
        <text:list-item>
          <text:p text:style-name="P8">Test audio file (MP3 or MP4) containing clear, known speech</text:p>
        </text:list-item>
      </text:list>
      <text:p text:style-name="Horizontal_20_Line"/>
      <text:h text:style-name="P17" text:outline-level="2">Test Data</text:h>
      <text:list xml:id="list3540022863520259118" text:style-name="L2">
        <text:list-item>
          <text:p text:style-name="P3"><text:span text:style-name="T1">Audio File: </text:span><text:span text:style-name="Source_20_Text"><text:span text:style-name="T3">test_sample.mp3</text:span></text:span><text:span text:style-name="T1"> (or </text:span><text:span text:style-name="Source_20_Text"><text:span text:style-name="T3">test_sample.mp4</text:span></text:span><text:span text:style-name="T1">)</text:span></text:p>
        </text:list-item>
        <text:list-item>
          <text:p text:style-name="P3"><text:span text:style-name="T1">Reference Transcript: </text:span><text:span text:style-name="Source_20_Text"><text:span text:style-name="T3">"Hello world, this is a test."</text:span></text:span></text:p>
        </text:list-item>
      </text:list>
      <text:p text:style-name="Horizontal_20_Line"/>
      <text:h text:style-name="P17" text:outline-level="2">Steps</text:h>
      <text:list xml:id="list4750055644745205721" text:style-name="L3">
        <text:list-item>
          <text:p text:style-name="P4"><text:span text:style-name="T1">Place the audio file </text:span><text:span text:style-name="Source_20_Text"><text:span text:style-name="T3">test_sample.mp3</text:span></text:span><text:span text:style-name="T1"> (or </text:span><text:span text:style-name="Source_20_Text"><text:span text:style-name="T3">test_sample.mp4</text:span></text:span><text:span text:style-name="T1">) in the working directory.</text:span></text:p>
        </text:list-item>
        <text:list-item>
          <text:p text:style-name="P4"><text:span text:style-name="T1">Update the script's </text:span><text:span text:style-name="Source_20_Text"><text:span text:style-name="T3">audio_file</text:span></text:span><text:span text:style-name="T1"> variable to point to the test audio file.</text:span></text:p>
        </text:list-item>
        <text:list-item>
          <text:p text:style-name="P4"><text:span text:style-name="T1">Update the script's </text:span><text:span text:style-name="Source_20_Text"><text:span text:style-name="T3">expected</text:span></text:span><text:span text:style-name="T1"> variable to the reference transcript.</text:span></text:p>
        </text:list-item>
        <text:list-item>
          <text:p text:style-name="P9">Run the script.</text:p>
        </text:list-item>
        <text:list-item>
          <text:p text:style-name="P9">Observe the output:</text:p>
          <text:list>
            <text:list-item>
              <text:p text:style-name="P7">Transcribed text</text:p>
            </text:list-item>
            <text:list-item>
              <text:p text:style-name="P7">Score card (accuracy and details)</text:p>
            </text:list-item>
          </text:list>
        </text:list-item>
      </text:list>
      <text:p text:style-name="Horizontal_20_Line"/>
      <text:h text:style-name="P17" text:outline-level="2"><text:soft-page-break/>Expected Results</text:h>
      <text:list xml:id="list3981737567430846233" text:style-name="L4">
        <text:list-item>
          <text:p text:style-name="P10">The script successfully loads and processes the MP3/MP4 file.</text:p>
        </text:list-item>
        <text:list-item>
          <text:p text:style-name="P10">The system outputs the transcription of the audio file.</text:p>
        </text:list-item>
        <text:list-item>
          <text:p text:style-name="P10">The score card is generated, showing the percentage of matched words (accuracy) and details of matched word count.</text:p>
        </text:list-item>
        <text:list-item>
          <text:p text:style-name="P10">Example output:</text:p>
          <text:p text:style-name="P15"><text:span text:style-name="Source_20_Text"><text:span text:style-name="T3">Transcription: Hello world, this is a test.</text:span></text:span></text:p>
          <text:p text:style-name="P16"><text:span text:style-name="Source_20_Text"><text:span text:style-name="T3">Score Card: {'accuracy_score': 100.0, 'details': ['Matched words: 5 / 5']}</text:span></text:span></text:p>
        </text:list-item>
      </text:list>
      <text:p text:style-name="Horizontal_20_Line"/>
      <text:h text:style-name="P17" text:outline-level="2">Negative Test Cases</text:h>
      <text:list xml:id="list681825087616982468" text:style-name="L5">
        <text:list-item>
          <text:p text:style-name="P5"><text:span text:style-name="Strong_20_Emphasis"><text:span text:style-name="T2">Invalid File Format</text:span></text:span><text:span text:style-name="T1">: Use a </text:span><text:span text:style-name="Source_20_Text"><text:span text:style-name="T3">.wav</text:span></text:span><text:span text:style-name="T1"> or </text:span><text:span text:style-name="Source_20_Text"><text:span text:style-name="T3">.txt</text:span></text:span><text:span text:style-name="T1"> file and verify the script raises "Unsupported format" error.</text:span></text:p>
        </text:list-item>
        <text:list-item>
          <text:p text:style-name="P13"><text:span text:style-name="Strong_20_Emphasis"><text:span text:style-name="T2">No Speech in Audio</text:span></text:span><text:span text:style-name="T1">: Use a silent MP3/MP4 file and verify the transcription is empty and score is 0.</text:span></text:p>
        </text:list-item>
        <text:list-item>
          <text:p text:style-name="P13"><text:span text:style-name="Strong_20_Emphasis"><text:span text:style-name="T2">Incorrect Reference Transcript</text:span></text:span><text:span text:style-name="T1">: Provide a mismatched reference transcript and verify the score card reflects lower accuracy.</text:span></text:p>
        </text:list-item>
      </text:list>
      <text:p text:style-name="Horizontal_20_Line"/>
      <text:h text:style-name="P17" text:outline-level="2">Post-conditions</text:h>
      <text:list xml:id="list7159876296438163501" text:style-name="L6">
        <text:list-item>
          <text:p text:style-name="P6"><text:span text:style-name="T1">Temporary files (e.g., </text:span><text:span text:style-name="Source_20_Text"><text:span text:style-name="T3">temp.wav</text:span></text:span><text:span text:style-name="T1">) are removed after execution.</text:span></text:p>
        </text:list-item>
        <text:list-item>
          <text:p text:style-name="P11">No errors or exceptions (unless negative scenarios).</text:p>
        </text:list-item>
      </text:list>
      <text:p text:style-name="Horizontal_20_Line"/>
      <text:h text:style-name="P17" text:outline-level="2">Comments</text:h>
      <text:list xml:id="list5186950732603852703" text:style-name="L7">
        <text:list-item>
          <text:p text:style-name="P12">For batch testing, repeat the steps with multiple audio files.</text:p>
        </text:list-item>
        <text:list-item>
          <text:p text:style-name="P12">For real-world accuracy, test with various speech accents and background noise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space Neon" svg:font-family="'Monaspace Neon', ui-monospace, SFMono-Regular, 'SF Mono', Menlo, Consolas, 'Liberation Mono', monospace"/>
    <style:font-face style:name="OpenSymbol" svg:font-family="OpenSymbol"/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15$Win32 OpenOffice.org_project/4115m2$Build-9813</meta:generator>
    <dc:date>2025-10-24T17:55:19.33</dc:date>
    <meta:document-statistic meta:table-count="0" meta:image-count="0" meta:object-count="0" meta:page-count="2" meta:paragraph-count="39" meta:word-count="298" meta:character-count="1898"/>
    <meta:user-defined meta:name="Info 1"/>
    <meta:user-defined meta:name="Info 2"/>
    <meta:user-defined meta:name="Info 3"/>
    <meta:user-defined meta:name="Info 4"/>
  </office:meta>
</office:document-meta>
</file>